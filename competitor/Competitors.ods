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3.43958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1">
            <text:p>capobianco</text:p>
          </table:table-cell>
          <table:table-cell office:value-type="string" table:style-name="ce1">
            <text:p>capobianco</text:p>
          </table:table-cell>
          <table:table-cell office:value-type="string" table:style-name="ce1">
            <text:p>faurecia</text:p>
          </table:table-cell>
          <table:table-cell office:value-type="string" table:style-name="ce1">
            <text:p>faure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singola</text:p>
          </table:table-cell>
          <table:table-cell office:value-type="string" table:style-name="ce1">
            <text:p>doppia</text:p>
          </table:table-cell>
          <table:table-cell office:value-type="string" table:style-name="ce1">
            <text:p>singola</text:p>
          </table:table-cell>
          <table:table-cell office:value-type="string" table:style-name="ce1">
            <text:p>doppia</text:p>
          </table:table-cell>
          <table:table-cell table:number-columns-repeated="16379"/>
        </table:table-row>
        <table:table-row table:style-name="ro1">
          <table:table-cell office:value-type="date" office:date-value="2025-12-12T00:00:00" table:style-name="ce2">
            <text:p>12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3T00:00:00" table:formula="of:=+[.A3]+1" table:style-name="ce2">
            <text:p>13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4T00:00:00" table:formula="of:=+[.A4]+1" table:style-name="ce2">
            <text:p>14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5T00:00:00" table:formula="of:=+[.A5]+1" table:style-name="ce2">
            <text:p>15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6T00:00:00" table:formula="of:=+[.A6]+1" table:style-name="ce2">
            <text:p>16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7T00:00:00" table:formula="of:=+[.A7]+1" table:style-name="ce2">
            <text:p>17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8T00:00:00" table:formula="of:=+[.A8]+1" table:style-name="ce2">
            <text:p>18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19T00:00:00" table:formula="of:=+[.A9]+1" table:style-name="ce2">
            <text:p>19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0T00:00:00" table:formula="of:=+[.A10]+1" table:style-name="ce2">
            <text:p>20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1T00:00:00" table:formula="of:=+[.A11]+1" table:style-name="ce2">
            <text:p>21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2T00:00:00" table:formula="of:=+[.A12]+1" table:style-name="ce2">
            <text:p>22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3T00:00:00" table:formula="of:=+[.A13]+1" table:style-name="ce2">
            <text:p>23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4T00:00:00" table:formula="of:=+[.A14]+1" table:style-name="ce2">
            <text:p>24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5T00:00:00" table:formula="of:=+[.A15]+1" table:style-name="ce2">
            <text:p>25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6T00:00:00" table:formula="of:=+[.A16]+1" table:style-name="ce2">
            <text:p>26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7T00:00:00" table:formula="of:=+[.A17]+1" table:style-name="ce2">
            <text:p>27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8T00:00:00" table:formula="of:=+[.A18]+1" table:style-name="ce2">
            <text:p>28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29T00:00:00" table:formula="of:=+[.A19]+1" table:style-name="ce2">
            <text:p>29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30T00:00:00" table:formula="of:=+[.A20]+1" table:style-name="ce2">
            <text:p>30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5-12-31T00:00:00" table:formula="of:=+[.A21]+1" table:style-name="ce2">
            <text:p>31/12/2025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1T00:00:00" table:formula="of:=+[.A22]+1" table:style-name="ce2">
            <text:p>01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2T00:00:00" table:formula="of:=+[.A23]+1" table:style-name="ce2">
            <text:p>02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3T00:00:00" table:formula="of:=+[.A24]+1" table:style-name="ce2">
            <text:p>03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4T00:00:00" table:formula="of:=+[.A25]+1" table:style-name="ce2">
            <text:p>04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5T00:00:00" table:formula="of:=+[.A26]+1" table:style-name="ce2">
            <text:p>05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6T00:00:00" table:formula="of:=+[.A27]+1" table:style-name="ce2">
            <text:p>06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7T00:00:00" table:formula="of:=+[.A28]+1" table:style-name="ce2">
            <text:p>07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8T00:00:00" table:formula="of:=+[.A29]+1" table:style-name="ce2">
            <text:p>08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09T00:00:00" table:formula="of:=+[.A30]+1" table:style-name="ce2">
            <text:p>09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0T00:00:00" table:formula="of:=+[.A31]+1" table:style-name="ce2">
            <text:p>10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1T00:00:00" table:formula="of:=+[.A32]+1" table:style-name="ce2">
            <text:p>11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2T00:00:00" table:formula="of:=+[.A33]+1" table:style-name="ce2">
            <text:p>12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3T00:00:00" table:formula="of:=+[.A34]+1" table:style-name="ce2">
            <text:p>13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4T00:00:00" table:formula="of:=+[.A35]+1" table:style-name="ce2">
            <text:p>14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5T00:00:00" table:formula="of:=+[.A36]+1" table:style-name="ce2">
            <text:p>15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6T00:00:00" table:formula="of:=+[.A37]+1" table:style-name="ce2">
            <text:p>16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7T00:00:00" table:formula="of:=+[.A38]+1" table:style-name="ce2">
            <text:p>17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8T00:00:00" table:formula="of:=+[.A39]+1" table:style-name="ce2">
            <text:p>18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19T00:00:00" table:formula="of:=+[.A40]+1" table:style-name="ce2">
            <text:p>19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0T00:00:00" table:formula="of:=+[.A41]+1" table:style-name="ce2">
            <text:p>20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1T00:00:00" table:formula="of:=+[.A42]+1" table:style-name="ce2">
            <text:p>21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2T00:00:00" table:formula="of:=+[.A43]+1" table:style-name="ce2">
            <text:p>22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3T00:00:00" table:formula="of:=+[.A44]+1" table:style-name="ce2">
            <text:p>23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4T00:00:00" table:formula="of:=+[.A45]+1" table:style-name="ce2">
            <text:p>24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5T00:00:00" table:formula="of:=+[.A46]+1" table:style-name="ce2">
            <text:p>25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6T00:00:00" table:formula="of:=+[.A47]+1" table:style-name="ce2">
            <text:p>26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7T00:00:00" table:formula="of:=+[.A48]+1" table:style-name="ce2">
            <text:p>27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8T00:00:00" table:formula="of:=+[.A49]+1" table:style-name="ce2">
            <text:p>28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29T00:00:00" table:formula="of:=+[.A50]+1" table:style-name="ce2">
            <text:p>29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30T00:00:00" table:formula="of:=+[.A51]+1" table:style-name="ce2">
            <text:p>30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1-31T00:00:00" table:formula="of:=+[.A52]+1" table:style-name="ce2">
            <text:p>31/01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1T00:00:00" table:formula="of:=+[.A53]+1" table:style-name="ce2">
            <text:p>01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2T00:00:00" table:formula="of:=+[.A54]+1" table:style-name="ce2">
            <text:p>02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3T00:00:00" table:formula="of:=+[.A55]+1" table:style-name="ce2">
            <text:p>03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4T00:00:00" table:formula="of:=+[.A56]+1" table:style-name="ce2">
            <text:p>04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5T00:00:00" table:formula="of:=+[.A57]+1" table:style-name="ce2">
            <text:p>05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6T00:00:00" table:formula="of:=+[.A58]+1" table:style-name="ce2">
            <text:p>06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7T00:00:00" table:formula="of:=+[.A59]+1" table:style-name="ce2">
            <text:p>07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8T00:00:00" table:formula="of:=+[.A60]+1" table:style-name="ce2">
            <text:p>08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09T00:00:00" table:formula="of:=+[.A61]+1" table:style-name="ce2">
            <text:p>09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0T00:00:00" table:formula="of:=+[.A62]+1" table:style-name="ce2">
            <text:p>10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1T00:00:00" table:formula="of:=+[.A63]+1" table:style-name="ce2">
            <text:p>11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2T00:00:00" table:formula="of:=+[.A64]+1" table:style-name="ce2">
            <text:p>12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3T00:00:00" table:formula="of:=+[.A65]+1" table:style-name="ce2">
            <text:p>13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4T00:00:00" table:formula="of:=+[.A66]+1" table:style-name="ce2">
            <text:p>14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5T00:00:00" table:formula="of:=+[.A67]+1" table:style-name="ce2">
            <text:p>15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6T00:00:00" table:formula="of:=+[.A68]+1" table:style-name="ce2">
            <text:p>16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7T00:00:00" table:formula="of:=+[.A69]+1" table:style-name="ce2">
            <text:p>17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8T00:00:00" table:formula="of:=+[.A70]+1" table:style-name="ce2">
            <text:p>18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19T00:00:00" table:formula="of:=+[.A71]+1" table:style-name="ce2">
            <text:p>19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0T00:00:00" table:formula="of:=+[.A72]+1" table:style-name="ce2">
            <text:p>20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1T00:00:00" table:formula="of:=+[.A73]+1" table:style-name="ce2">
            <text:p>21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2T00:00:00" table:formula="of:=+[.A74]+1" table:style-name="ce2">
            <text:p>22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3T00:00:00" table:formula="of:=+[.A75]+1" table:style-name="ce2">
            <text:p>23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4T00:00:00" table:formula="of:=+[.A76]+1" table:style-name="ce2">
            <text:p>24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5T00:00:00" table:formula="of:=+[.A77]+1" table:style-name="ce2">
            <text:p>25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6T00:00:00" table:formula="of:=+[.A78]+1" table:style-name="ce2">
            <text:p>26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7T00:00:00" table:formula="of:=+[.A79]+1" table:style-name="ce2">
            <text:p>27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2-28T00:00:00" table:formula="of:=+[.A80]+1" table:style-name="ce2">
            <text:p>28/02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1T00:00:00" table:formula="of:=+[.A81]+1" table:style-name="ce2">
            <text:p>01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2T00:00:00" table:formula="of:=+[.A82]+1" table:style-name="ce2">
            <text:p>02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3T00:00:00" table:formula="of:=+[.A83]+1" table:style-name="ce2">
            <text:p>03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4T00:00:00" table:formula="of:=+[.A84]+1" table:style-name="ce2">
            <text:p>04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5T00:00:00" table:formula="of:=+[.A85]+1" table:style-name="ce2">
            <text:p>05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6T00:00:00" table:formula="of:=+[.A86]+1" table:style-name="ce2">
            <text:p>06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7T00:00:00" table:formula="of:=+[.A87]+1" table:style-name="ce2">
            <text:p>07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8T00:00:00" table:formula="of:=+[.A88]+1" table:style-name="ce2">
            <text:p>08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09T00:00:00" table:formula="of:=+[.A89]+1" table:style-name="ce2">
            <text:p>09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0T00:00:00" table:formula="of:=+[.A90]+1" table:style-name="ce2">
            <text:p>10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1T00:00:00" table:formula="of:=+[.A91]+1" table:style-name="ce2">
            <text:p>11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2T00:00:00" table:formula="of:=+[.A92]+1" table:style-name="ce2">
            <text:p>12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3T00:00:00" table:formula="of:=+[.A93]+1" table:style-name="ce2">
            <text:p>13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4T00:00:00" table:formula="of:=+[.A94]+1" table:style-name="ce2">
            <text:p>14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5T00:00:00" table:formula="of:=+[.A95]+1" table:style-name="ce2">
            <text:p>15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6T00:00:00" table:formula="of:=+[.A96]+1" table:style-name="ce2">
            <text:p>16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7T00:00:00" table:formula="of:=+[.A97]+1" table:style-name="ce2">
            <text:p>17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8T00:00:00" table:formula="of:=+[.A98]+1" table:style-name="ce2">
            <text:p>18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19T00:00:00" table:formula="of:=+[.A99]+1" table:style-name="ce2">
            <text:p>19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0T00:00:00" table:formula="of:=+[.A100]+1" table:style-name="ce2">
            <text:p>20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1T00:00:00" table:formula="of:=+[.A101]+1" table:style-name="ce2">
            <text:p>21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2T00:00:00" table:formula="of:=+[.A102]+1" table:style-name="ce2">
            <text:p>22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3T00:00:00" table:formula="of:=+[.A103]+1" table:style-name="ce2">
            <text:p>23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4T00:00:00" table:formula="of:=+[.A104]+1" table:style-name="ce2">
            <text:p>24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5T00:00:00" table:formula="of:=+[.A105]+1" table:style-name="ce2">
            <text:p>25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6T00:00:00" table:formula="of:=+[.A106]+1" table:style-name="ce2">
            <text:p>26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7T00:00:00" table:formula="of:=+[.A107]+1" table:style-name="ce2">
            <text:p>27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8T00:00:00" table:formula="of:=+[.A108]+1" table:style-name="ce2">
            <text:p>28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29T00:00:00" table:formula="of:=+[.A109]+1" table:style-name="ce2">
            <text:p>29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30T00:00:00" table:formula="of:=+[.A110]+1" table:style-name="ce2">
            <text:p>30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3-31T00:00:00" table:formula="of:=+[.A111]+1" table:style-name="ce2">
            <text:p>31/03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1T00:00:00" table:formula="of:=+[.A112]+1" table:style-name="ce2">
            <text:p>01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2T00:00:00" table:formula="of:=+[.A113]+1" table:style-name="ce2">
            <text:p>02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3T00:00:00" table:formula="of:=+[.A114]+1" table:style-name="ce2">
            <text:p>03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4T00:00:00" table:formula="of:=+[.A115]+1" table:style-name="ce2">
            <text:p>04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5T00:00:00" table:formula="of:=+[.A116]+1" table:style-name="ce2">
            <text:p>05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6T00:00:00" table:formula="of:=+[.A117]+1" table:style-name="ce2">
            <text:p>06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7T00:00:00" table:formula="of:=+[.A118]+1" table:style-name="ce2">
            <text:p>07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8T00:00:00" table:formula="of:=+[.A119]+1" table:style-name="ce2">
            <text:p>08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09T00:00:00" table:formula="of:=+[.A120]+1" table:style-name="ce2">
            <text:p>09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0T00:00:00" table:formula="of:=+[.A121]+1" table:style-name="ce2">
            <text:p>10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1T00:00:00" table:formula="of:=+[.A122]+1" table:style-name="ce2">
            <text:p>11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2T00:00:00" table:formula="of:=+[.A123]+1" table:style-name="ce2">
            <text:p>12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3T00:00:00" table:formula="of:=+[.A124]+1" table:style-name="ce2">
            <text:p>13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4T00:00:00" table:formula="of:=+[.A125]+1" table:style-name="ce2">
            <text:p>14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5T00:00:00" table:formula="of:=+[.A126]+1" table:style-name="ce2">
            <text:p>15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6T00:00:00" table:formula="of:=+[.A127]+1" table:style-name="ce2">
            <text:p>16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7T00:00:00" table:formula="of:=+[.A128]+1" table:style-name="ce2">
            <text:p>17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8T00:00:00" table:formula="of:=+[.A129]+1" table:style-name="ce2">
            <text:p>18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19T00:00:00" table:formula="of:=+[.A130]+1" table:style-name="ce2">
            <text:p>19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0T00:00:00" table:formula="of:=+[.A131]+1" table:style-name="ce2">
            <text:p>20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1T00:00:00" table:formula="of:=+[.A132]+1" table:style-name="ce2">
            <text:p>21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2T00:00:00" table:formula="of:=+[.A133]+1" table:style-name="ce2">
            <text:p>22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3T00:00:00" table:formula="of:=+[.A134]+1" table:style-name="ce2">
            <text:p>23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4T00:00:00" table:formula="of:=+[.A135]+1" table:style-name="ce2">
            <text:p>24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5T00:00:00" table:formula="of:=+[.A136]+1" table:style-name="ce2">
            <text:p>25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6T00:00:00" table:formula="of:=+[.A137]+1" table:style-name="ce2">
            <text:p>26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7T00:00:00" table:formula="of:=+[.A138]+1" table:style-name="ce2">
            <text:p>27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8T00:00:00" table:formula="of:=+[.A139]+1" table:style-name="ce2">
            <text:p>28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29T00:00:00" table:formula="of:=+[.A140]+1" table:style-name="ce2">
            <text:p>29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4-30T00:00:00" table:formula="of:=+[.A141]+1" table:style-name="ce2">
            <text:p>30/04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1T00:00:00" table:formula="of:=+[.A142]+1" table:style-name="ce2">
            <text:p>01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2T00:00:00" table:formula="of:=+[.A143]+1" table:style-name="ce2">
            <text:p>02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3T00:00:00" table:formula="of:=+[.A144]+1" table:style-name="ce2">
            <text:p>03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4T00:00:00" table:formula="of:=+[.A145]+1" table:style-name="ce2">
            <text:p>04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5T00:00:00" table:formula="of:=+[.A146]+1" table:style-name="ce2">
            <text:p>05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6T00:00:00" table:formula="of:=+[.A147]+1" table:style-name="ce2">
            <text:p>06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7T00:00:00" table:formula="of:=+[.A148]+1" table:style-name="ce2">
            <text:p>07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8T00:00:00" table:formula="of:=+[.A149]+1" table:style-name="ce2">
            <text:p>08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09T00:00:00" table:formula="of:=+[.A150]+1" table:style-name="ce2">
            <text:p>09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0T00:00:00" table:formula="of:=+[.A151]+1" table:style-name="ce2">
            <text:p>10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1T00:00:00" table:formula="of:=+[.A152]+1" table:style-name="ce2">
            <text:p>11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2T00:00:00" table:formula="of:=+[.A153]+1" table:style-name="ce2">
            <text:p>12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3T00:00:00" table:formula="of:=+[.A154]+1" table:style-name="ce2">
            <text:p>13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4T00:00:00" table:formula="of:=+[.A155]+1" table:style-name="ce2">
            <text:p>14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5T00:00:00" table:formula="of:=+[.A156]+1" table:style-name="ce2">
            <text:p>15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6T00:00:00" table:formula="of:=+[.A157]+1" table:style-name="ce2">
            <text:p>16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7T00:00:00" table:formula="of:=+[.A158]+1" table:style-name="ce2">
            <text:p>17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8T00:00:00" table:formula="of:=+[.A159]+1" table:style-name="ce2">
            <text:p>18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19T00:00:00" table:formula="of:=+[.A160]+1" table:style-name="ce2">
            <text:p>19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0T00:00:00" table:formula="of:=+[.A161]+1" table:style-name="ce2">
            <text:p>20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1T00:00:00" table:formula="of:=+[.A162]+1" table:style-name="ce2">
            <text:p>21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2T00:00:00" table:formula="of:=+[.A163]+1" table:style-name="ce2">
            <text:p>22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3T00:00:00" table:formula="of:=+[.A164]+1" table:style-name="ce2">
            <text:p>23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4T00:00:00" table:formula="of:=+[.A165]+1" table:style-name="ce2">
            <text:p>24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5T00:00:00" table:formula="of:=+[.A166]+1" table:style-name="ce2">
            <text:p>25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6T00:00:00" table:formula="of:=+[.A167]+1" table:style-name="ce2">
            <text:p>26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7T00:00:00" table:formula="of:=+[.A168]+1" table:style-name="ce2">
            <text:p>27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8T00:00:00" table:formula="of:=+[.A169]+1" table:style-name="ce2">
            <text:p>28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29T00:00:00" table:formula="of:=+[.A170]+1" table:style-name="ce2">
            <text:p>29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30T00:00:00" table:formula="of:=+[.A171]+1" table:style-name="ce2">
            <text:p>30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5-31T00:00:00" table:formula="of:=+[.A172]+1" table:style-name="ce2">
            <text:p>31/05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1T00:00:00" table:formula="of:=+[.A173]+1" table:style-name="ce2">
            <text:p>01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2T00:00:00" table:formula="of:=+[.A174]+1" table:style-name="ce2">
            <text:p>02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3T00:00:00" table:formula="of:=+[.A175]+1" table:style-name="ce2">
            <text:p>03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4T00:00:00" table:formula="of:=+[.A176]+1" table:style-name="ce2">
            <text:p>04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5T00:00:00" table:formula="of:=+[.A177]+1" table:style-name="ce2">
            <text:p>05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6T00:00:00" table:formula="of:=+[.A178]+1" table:style-name="ce2">
            <text:p>06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7T00:00:00" table:formula="of:=+[.A179]+1" table:style-name="ce2">
            <text:p>07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8T00:00:00" table:formula="of:=+[.A180]+1" table:style-name="ce2">
            <text:p>08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09T00:00:00" table:formula="of:=+[.A181]+1" table:style-name="ce2">
            <text:p>09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0T00:00:00" table:formula="of:=+[.A182]+1" table:style-name="ce2">
            <text:p>10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1T00:00:00" table:formula="of:=+[.A183]+1" table:style-name="ce2">
            <text:p>11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2T00:00:00" table:formula="of:=+[.A184]+1" table:style-name="ce2">
            <text:p>12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3T00:00:00" table:formula="of:=+[.A185]+1" table:style-name="ce2">
            <text:p>13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4T00:00:00" table:formula="of:=+[.A186]+1" table:style-name="ce2">
            <text:p>14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5T00:00:00" table:formula="of:=+[.A187]+1" table:style-name="ce2">
            <text:p>15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6T00:00:00" table:formula="of:=+[.A188]+1" table:style-name="ce2">
            <text:p>16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7T00:00:00" table:formula="of:=+[.A189]+1" table:style-name="ce2">
            <text:p>17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8T00:00:00" table:formula="of:=+[.A190]+1" table:style-name="ce2">
            <text:p>18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19T00:00:00" table:formula="of:=+[.A191]+1" table:style-name="ce2">
            <text:p>19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0T00:00:00" table:formula="of:=+[.A192]+1" table:style-name="ce2">
            <text:p>20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1T00:00:00" table:formula="of:=+[.A193]+1" table:style-name="ce2">
            <text:p>21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2T00:00:00" table:formula="of:=+[.A194]+1" table:style-name="ce2">
            <text:p>22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3T00:00:00" table:formula="of:=+[.A195]+1" table:style-name="ce2">
            <text:p>23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4T00:00:00" table:formula="of:=+[.A196]+1" table:style-name="ce2">
            <text:p>24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5T00:00:00" table:formula="of:=+[.A197]+1" table:style-name="ce2">
            <text:p>25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6T00:00:00" table:formula="of:=+[.A198]+1" table:style-name="ce2">
            <text:p>26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7T00:00:00" table:formula="of:=+[.A199]+1" table:style-name="ce2">
            <text:p>27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8T00:00:00" table:formula="of:=+[.A200]+1" table:style-name="ce2">
            <text:p>28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29T00:00:00" table:formula="of:=+[.A201]+1" table:style-name="ce2">
            <text:p>29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6-30T00:00:00" table:formula="of:=+[.A202]+1" table:style-name="ce2">
            <text:p>30/06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1T00:00:00" table:formula="of:=+[.A203]+1" table:style-name="ce2">
            <text:p>01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2T00:00:00" table:formula="of:=+[.A204]+1" table:style-name="ce2">
            <text:p>02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3T00:00:00" table:formula="of:=+[.A205]+1" table:style-name="ce2">
            <text:p>03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4T00:00:00" table:formula="of:=+[.A206]+1" table:style-name="ce2">
            <text:p>04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5T00:00:00" table:formula="of:=+[.A207]+1" table:style-name="ce2">
            <text:p>05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6T00:00:00" table:formula="of:=+[.A208]+1" table:style-name="ce2">
            <text:p>06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7T00:00:00" table:formula="of:=+[.A209]+1" table:style-name="ce2">
            <text:p>07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8T00:00:00" table:formula="of:=+[.A210]+1" table:style-name="ce2">
            <text:p>08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09T00:00:00" table:formula="of:=+[.A211]+1" table:style-name="ce2">
            <text:p>09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0T00:00:00" table:formula="of:=+[.A212]+1" table:style-name="ce2">
            <text:p>10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1T00:00:00" table:formula="of:=+[.A213]+1" table:style-name="ce2">
            <text:p>11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2T00:00:00" table:formula="of:=+[.A214]+1" table:style-name="ce2">
            <text:p>12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3T00:00:00" table:formula="of:=+[.A215]+1" table:style-name="ce2">
            <text:p>13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4T00:00:00" table:formula="of:=+[.A216]+1" table:style-name="ce2">
            <text:p>14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5T00:00:00" table:formula="of:=+[.A217]+1" table:style-name="ce2">
            <text:p>15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6T00:00:00" table:formula="of:=+[.A218]+1" table:style-name="ce2">
            <text:p>16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7T00:00:00" table:formula="of:=+[.A219]+1" table:style-name="ce2">
            <text:p>17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8T00:00:00" table:formula="of:=+[.A220]+1" table:style-name="ce2">
            <text:p>18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19T00:00:00" table:formula="of:=+[.A221]+1" table:style-name="ce2">
            <text:p>19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0T00:00:00" table:formula="of:=+[.A222]+1" table:style-name="ce2">
            <text:p>20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1T00:00:00" table:formula="of:=+[.A223]+1" table:style-name="ce2">
            <text:p>21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2T00:00:00" table:formula="of:=+[.A224]+1" table:style-name="ce2">
            <text:p>22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3T00:00:00" table:formula="of:=+[.A225]+1" table:style-name="ce2">
            <text:p>23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4T00:00:00" table:formula="of:=+[.A226]+1" table:style-name="ce2">
            <text:p>24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5T00:00:00" table:formula="of:=+[.A227]+1" table:style-name="ce2">
            <text:p>25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6T00:00:00" table:formula="of:=+[.A228]+1" table:style-name="ce2">
            <text:p>26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7T00:00:00" table:formula="of:=+[.A229]+1" table:style-name="ce2">
            <text:p>27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8T00:00:00" table:formula="of:=+[.A230]+1" table:style-name="ce2">
            <text:p>28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29T00:00:00" table:formula="of:=+[.A231]+1" table:style-name="ce2">
            <text:p>29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30T00:00:00" table:formula="of:=+[.A232]+1" table:style-name="ce2">
            <text:p>30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7-31T00:00:00" table:formula="of:=+[.A233]+1" table:style-name="ce2">
            <text:p>31/07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1T00:00:00" table:formula="of:=+[.A234]+1" table:style-name="ce2">
            <text:p>01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2T00:00:00" table:formula="of:=+[.A235]+1" table:style-name="ce2">
            <text:p>02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3T00:00:00" table:formula="of:=+[.A236]+1" table:style-name="ce2">
            <text:p>03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4T00:00:00" table:formula="of:=+[.A237]+1" table:style-name="ce2">
            <text:p>04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5T00:00:00" table:formula="of:=+[.A238]+1" table:style-name="ce2">
            <text:p>05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6T00:00:00" table:formula="of:=+[.A239]+1" table:style-name="ce2">
            <text:p>06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7T00:00:00" table:formula="of:=+[.A240]+1" table:style-name="ce2">
            <text:p>07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8T00:00:00" table:formula="of:=+[.A241]+1" table:style-name="ce2">
            <text:p>08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09T00:00:00" table:formula="of:=+[.A242]+1" table:style-name="ce2">
            <text:p>09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0T00:00:00" table:formula="of:=+[.A243]+1" table:style-name="ce2">
            <text:p>10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1T00:00:00" table:formula="of:=+[.A244]+1" table:style-name="ce2">
            <text:p>11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2T00:00:00" table:formula="of:=+[.A245]+1" table:style-name="ce2">
            <text:p>12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3T00:00:00" table:formula="of:=+[.A246]+1" table:style-name="ce2">
            <text:p>13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4T00:00:00" table:formula="of:=+[.A247]+1" table:style-name="ce2">
            <text:p>14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5T00:00:00" table:formula="of:=+[.A248]+1" table:style-name="ce2">
            <text:p>15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6T00:00:00" table:formula="of:=+[.A249]+1" table:style-name="ce2">
            <text:p>16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7T00:00:00" table:formula="of:=+[.A250]+1" table:style-name="ce2">
            <text:p>17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8T00:00:00" table:formula="of:=+[.A251]+1" table:style-name="ce2">
            <text:p>18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19T00:00:00" table:formula="of:=+[.A252]+1" table:style-name="ce2">
            <text:p>19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0T00:00:00" table:formula="of:=+[.A253]+1" table:style-name="ce2">
            <text:p>20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1T00:00:00" table:formula="of:=+[.A254]+1" table:style-name="ce2">
            <text:p>21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2T00:00:00" table:formula="of:=+[.A255]+1" table:style-name="ce2">
            <text:p>22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3T00:00:00" table:formula="of:=+[.A256]+1" table:style-name="ce2">
            <text:p>23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4T00:00:00" table:formula="of:=+[.A257]+1" table:style-name="ce2">
            <text:p>24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5T00:00:00" table:formula="of:=+[.A258]+1" table:style-name="ce2">
            <text:p>25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6T00:00:00" table:formula="of:=+[.A259]+1" table:style-name="ce2">
            <text:p>26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7T00:00:00" table:formula="of:=+[.A260]+1" table:style-name="ce2">
            <text:p>27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8T00:00:00" table:formula="of:=+[.A261]+1" table:style-name="ce2">
            <text:p>28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29T00:00:00" table:formula="of:=+[.A262]+1" table:style-name="ce2">
            <text:p>29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30T00:00:00" table:formula="of:=+[.A263]+1" table:style-name="ce2">
            <text:p>30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8-31T00:00:00" table:formula="of:=+[.A264]+1" table:style-name="ce2">
            <text:p>31/08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1T00:00:00" table:formula="of:=+[.A265]+1" table:style-name="ce2">
            <text:p>01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2T00:00:00" table:formula="of:=+[.A266]+1" table:style-name="ce2">
            <text:p>02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3T00:00:00" table:formula="of:=+[.A267]+1" table:style-name="ce2">
            <text:p>03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4T00:00:00" table:formula="of:=+[.A268]+1" table:style-name="ce2">
            <text:p>04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5T00:00:00" table:formula="of:=+[.A269]+1" table:style-name="ce2">
            <text:p>05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6T00:00:00" table:formula="of:=+[.A270]+1" table:style-name="ce2">
            <text:p>06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7T00:00:00" table:formula="of:=+[.A271]+1" table:style-name="ce2">
            <text:p>07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8T00:00:00" table:formula="of:=+[.A272]+1" table:style-name="ce2">
            <text:p>08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09T00:00:00" table:formula="of:=+[.A273]+1" table:style-name="ce2">
            <text:p>09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0T00:00:00" table:formula="of:=+[.A274]+1" table:style-name="ce2">
            <text:p>10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1T00:00:00" table:formula="of:=+[.A275]+1" table:style-name="ce2">
            <text:p>11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2T00:00:00" table:formula="of:=+[.A276]+1" table:style-name="ce2">
            <text:p>12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3T00:00:00" table:formula="of:=+[.A277]+1" table:style-name="ce2">
            <text:p>13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4T00:00:00" table:formula="of:=+[.A278]+1" table:style-name="ce2">
            <text:p>14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5T00:00:00" table:formula="of:=+[.A279]+1" table:style-name="ce2">
            <text:p>15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6T00:00:00" table:formula="of:=+[.A280]+1" table:style-name="ce2">
            <text:p>16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date" office:date-value="2026-09-17T00:00:00" table:formula="of:=+[.A281]+1" table:style-name="ce2">
            <text:p>17/09/2026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150" table:style-name="ce1">
            <text:p>15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number-rows-repeated="10482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Pucci, Gennaro</meta:initial-creator>
    <dc:creator>Pucci, Gennaro</dc:creator>
    <meta:creation-date>2025-12-12T14:05:45Z</meta:creation-date>
    <dc:date>2025-12-12T14:23:00Z</dc:date>
  </office:meta>
</office:document-meta>
</file>